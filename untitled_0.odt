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d1db9" officeooo:paragraph-rsid="001d1db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20pt" fo:font-weight="bold" officeooo:rsid="001d1db9" officeooo:paragraph-rsid="001d1db9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5pt" officeooo:paragraph-rsid="001d1db9" style:font-size-asian="15pt" style:font-size-complex="15pt"/>
    </style:style>
    <style:style style:name="P4" style:family="paragraph" style:parent-style-name="Standard">
      <style:text-properties fo:font-size="15pt" fo:font-weight="bold" officeooo:paragraph-rsid="001f6fef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officeooo:rsid="001d1db9" officeooo:paragraph-rsid="001d1db9" style:font-size-asian="15pt" style:font-size-complex="15pt"/>
    </style:style>
    <style:style style:name="P6" style:family="paragraph" style:parent-style-name="Standard">
      <style:text-properties fo:font-size="15pt" fo:font-weight="bold" officeooo:rsid="001d1fdc" officeooo:paragraph-rsid="001d1fdc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officeooo:rsid="001d1fdc" officeooo:paragraph-rsid="001d1fdc" style:font-size-asian="15pt" style:font-size-complex="15pt"/>
    </style:style>
    <style:style style:name="P8" style:family="paragraph" style:parent-style-name="Standard">
      <style:text-properties fo:font-size="15pt" officeooo:paragraph-rsid="001d1fdc" style:font-size-asian="15pt" style:font-size-complex="15pt"/>
    </style:style>
    <style:style style:name="P9" style:family="paragraph" style:parent-style-name="Standard">
      <style:text-properties fo:font-size="15pt" officeooo:rsid="001f6fef" officeooo:paragraph-rsid="001f6fef" style:font-size-asian="15pt" style:font-size-complex="15pt"/>
    </style:style>
    <style:style style:name="P10" style:family="paragraph" style:parent-style-name="Standard">
      <style:text-properties officeooo:paragraph-rsid="001f6fef"/>
    </style:style>
    <style:style style:name="P11" style:family="paragraph" style:parent-style-name="Standard">
      <style:text-properties fo:font-weight="bold" officeooo:paragraph-rsid="001f6fef" style:font-weight-asian="bold" style:font-weight-complex="bold"/>
    </style:style>
    <style:style style:name="P12" style:family="paragraph" style:parent-style-name="Standard">
      <style:text-properties fo:font-size="15pt" officeooo:rsid="0020d9a1" officeooo:paragraph-rsid="0020d9a1" style:font-size-asian="15pt" style:font-size-complex="15pt"/>
    </style:style>
    <style:style style:name="P13" style:family="paragraph" style:parent-style-name="Heading_20_3">
      <style:text-properties fo:font-size="15pt" officeooo:rsid="0020d9a1" officeooo:paragraph-rsid="0020d9a1" style:font-size-asian="15pt" style:font-size-complex="15pt"/>
    </style:style>
    <style:style style:name="P14" style:family="paragraph" style:parent-style-name="Text_20_body">
      <style:text-properties fo:font-size="15pt" officeooo:rsid="0020d9a1" style:font-size-asian="15pt" style:font-size-complex="15pt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fo:font-size="15pt" officeooo:rsid="0020d9a1" style:font-size-asian="15pt" style:font-size-complex="15pt"/>
    </style:style>
    <style:style style:name="P16" style:family="paragraph" style:parent-style-name="Text_20_body" style:list-style-name="L1">
      <style:text-properties fo:font-size="15pt" officeooo:rsid="0020d9a1" style:font-size-asian="15pt" style:font-size-complex="15pt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fo:font-size="15pt" officeooo:rsid="0020d9a1" style:font-size-asian="15pt" style:font-size-complex="15pt"/>
    </style:style>
    <style:style style:name="P18" style:family="paragraph" style:parent-style-name="Text_20_body" style:list-style-name="L2">
      <style:text-properties fo:font-size="15pt" officeooo:rsid="0020d9a1" style:font-size-asian="15pt" style:font-size-complex="15pt"/>
    </style:style>
    <style:style style:name="P19" style:family="paragraph" style:parent-style-name="Horizontal_20_Line">
      <style:text-properties fo:font-size="15pt" officeooo:rsid="0020d9a1" style:font-size-asian="15pt" style:font-size-complex="15pt"/>
    </style:style>
    <style:style style:name="P20" style:family="paragraph" style:parent-style-name="Standard">
      <style:text-properties officeooo:paragraph-rsid="001d1db9"/>
    </style:style>
    <style:style style:name="P21" style:family="paragraph" style:parent-style-name="Standard">
      <style:text-properties officeooo:rsid="001d1db9" officeooo:paragraph-rsid="001d1db9"/>
    </style:style>
    <style:style style:name="T1" style:family="text">
      <style:text-properties fo:font-weight="bold" officeooo:rsid="001d1db9" style:font-weight-asian="bold" style:font-weight-complex="bold"/>
    </style:style>
    <style:style style:name="T2" style:family="text">
      <style:text-properties fo:font-weight="bold" officeooo:rsid="001f6fef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1db9"/>
    </style:style>
    <style:style style:name="T5" style:family="text">
      <style:text-properties officeooo:rsid="001d1fdc"/>
    </style:style>
    <style:style style:name="T6" style:family="text">
      <style:text-properties officeooo:rsid="001dd296"/>
    </style:style>
    <style:style style:name="T7" style:family="text">
      <style:text-properties fo:font-size="15pt" officeooo:rsid="001f6fef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n XAI</text:p>
      <text:p text:style-name="P1"/>
      <text:p text:style-name="P1"/>
      <text:p text:style-name="P2">**XAI- reference papers;</text:p>
      <text:p text:style-name="P3"><text:span text:style-name="T1">.</text:span><text:span text:style-name="T2">)</text:span><text:span text:style-name="T3">A Survey on Explainable Artificial Intelligence (XAI):</text:span><text:span text:style-name="T3"> Towards Medical XAI;</text:span></text:p>
      <text:p text:style-name="P4"><text:span text:style-name="T4">.E</text:span>xplainable Artificial Intelligence Approaches: A Survey;</text:p>
      <text:p text:style-name="P5">=&gt; talks about the different features that are used for <text:s/>explaining the predictions done by an ai model and also to understand the accuracy of the predicitons as well as explanations using both mathematical and practical ways;</text:p>
      <text:p text:style-name="P5"/>
      <text:p text:style-name="P5"/>
      <text:p text:style-name="P6">topics useful for our project:</text:p>
      <text:p text:style-name="P7"/>
      <text:p text:style-name="P7">.Clustering logic implemented by the kubernetes Ai model can be validated by the user using techniques like LIME ,RULE_SETS, TCAV,t-SNE</text:p>
      <text:p text:style-name="P7"/>
      <text:p text:style-name="P7">.Generation of YAML files for the kubernetes logic;</text:p>
      <text:p text:style-name="P7"/>
      <text:p text:style-name="P8"><text:span text:style-name="T5">.</text:span><text:span text:style-name="T6">SHAP techniques will be useful for the decision analysis</text:span></text:p>
      <text:p text:style-name="P9"/>
      <text:p text:style-name="P9"/>
      <text:p text:style-name="P9">**)Metrics required for XAI in terms of kubernetes development</text:p>
      <text:p text:style-name="P9"/>
      <text:p text:style-name="P10"><text:span text:style-name="T7">.</text:span><text:span text:style-name="T3">Explanation Fidelity</text:span></text:p>
      <text:p text:style-name="P11"/>
      <text:p text:style-name="P11">.Explanation Coverage</text:p>
      <text:p text:style-name="P11"/>
      <text:p text:style-name="P11">.Counterfactual Quality</text:p>
      <text:p text:style-name="P11"/>
      <text:p text:style-name="P11">.Deployment Success Rate</text:p>
      <text:p text:style-name="P3"/>
      <text:p text:style-name="P3"/>
      <text:p text:style-name="P12">**)</text:p>
      <text:p text:style-name="P12">Scope of prometheus and grafana:</text:p>
      <text:p text:style-name="P12"/>
      <text:h text:style-name="P13" text:outline-level="3">Prometheus <text:s/>in <text:s/>Project</text:h>
      <text:p text:style-name="P14">Prometheus acts as the <text:span text:style-name="Strong_20_Emphasis">data collector</text:span>. It continuously gathers Kubernetes metrics such as:</text:p>
      <text:list text:style-name="L1">
        <text:list-item>
          <text:p text:style-name="P15"><text:soft-page-break/>CPU usage </text:p>
        </text:list-item>
        <text:list-item>
          <text:p text:style-name="P15">Memory usage </text:p>
        </text:list-item>
        <text:list-item>
          <text:p text:style-name="P15">Pod health </text:p>
        </text:list-item>
        <text:list-item>
          <text:p text:style-name="P15">Replica count </text:p>
        </text:list-item>
        <text:list-item>
          <text:p text:style-name="P16">Traffic/load </text:p>
        </text:list-item>
      </text:list>
      <text:p text:style-name="P14">It can also collect your <text:span text:style-name="Strong_20_Emphasis">custom AI/XAI metrics</text:span> like:</text:p>
      <text:list text:style-name="L2">
        <text:list-item>
          <text:p text:style-name="P17">Fidelity Score </text:p>
        </text:list-item>
        <text:list-item>
          <text:p text:style-name="P17">Confidence Score </text:p>
        </text:list-item>
        <text:list-item>
          <text:p text:style-name="P17">Coverage Score </text:p>
        </text:list-item>
        <text:list-item>
          <text:p text:style-name="P18">Deployment Success Rate </text:p>
        </text:list-item>
      </text:list>
      <text:p text:style-name="P14">These metrics become the input for your AI and are also stored for monitoring.</text:p>
      <text:p text:style-name="P19"/>
      <text:p text:style-name="P12"/>
      <text:p text:style-name="P3"/>
      <text:p text:style-name="P3"/>
      <text:p text:style-name="P3"/>
      <text:p text:style-name="P3"/>
      <text:p text:style-name="P3"/>
      <text:p text:style-name="P20"/>
      <text:p text:style-name="P20"/>
      <text:p text:style-name="P20"/>
      <text:p text:style-name="P20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4T19:54:10.304845254</meta:creation-date>
    <meta:print-date>2026-06-04T22:59:04.616067098</meta:print-date>
    <meta:printed-by>PDF files</meta:printed-by>
    <dc:date>2026-06-04T23:03:27.149634617</dc:date>
    <meta:editing-duration>PT4M22S</meta:editing-duration>
    <meta:editing-cycles>1</meta:editing-cycles>
    <meta:document-statistic meta:table-count="0" meta:image-count="0" meta:object-count="0" meta:page-count="2" meta:paragraph-count="29" meta:word-count="191" meta:character-count="1248" meta:non-whitespace-character-count="1083"/>
    <meta:generator>LibreOffice/26.2.3.2$Linux_X86_64 LibreOffice_project/620$Build-2</meta:generator>
  </office:meta>
</office:document-meta>
</file>